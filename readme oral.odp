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6" style:parent-style-name="Graphics">
      <style:graphic-properties draw:fill="none" fo:clip="rect(0in, 0in, 0in, 0in)" draw:stroke="none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9" style:parent-style-name="Graphics">
      <style:graphic-properties draw:fill="none" fo:clip="rect(0in, 0in, 0in, 0in)" draw:stroke="non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presentation:style-name="a338" draw:name="Titre 1" svg:x="0in" svg:y="0in" svg:width="13.33333in" svg:height="1.1in" presentation:class="title" presentation:placeholder="false">
          <draw:text-box>
            <text:p text:style-name="a337" text:class-names="" text:cond-style-name=""><text:span text:style-name="a336" text:class-names="">Sensotia</text:span></text:p>
          </draw:text-box>
          <svg:title/>
          <svg:desc/>
        </draw:frame>
        <draw:frame draw:id="id64" presentation:style-name="a341" draw:name="Sous-titre 2" svg:x="0in" svg:y="1.1in" svg:width="13.33333in" svg:height="6.4in" presentation:class="subtitle" presentation:placeholder="false">
          <draw:text-box>
            <text:p text:style-name="a340" text:class-names="" text:cond-style-name=""><text:span text:style-name="a339" text:class-names="">Wiki nouvelle génération pour l'informatique. Open source, pensé pour l'accessibilité et la lecture rapide.</text:span></text:p>
          </draw:text-box>
          <svg:title/>
          <svg:desc/>
        </draw:frame>
      </draw:page>
      <draw:page draw:name="Slide2" draw:style-name="a342" draw:master-page-name="Master1-Layout2-obj-Titre-et-contenu" presentation:presentation-page-layout-name="Master1-PPL2" draw:id="Slide-257">
        <draw:frame draw:id="id65" presentation:style-name="a375" draw:name="Espace réservé du contenu 2" svg:x="0in" svg:y="0in" svg:width="13.33333in" svg:height="4.54in" presentation:class="outline" presentation:placeholder="false">
          <draw:text-box>
            <text:list text:style-name="a346">
              <text:list-item>
                <text:p text:style-name="a345" text:class-names="" text:cond-style-name=""><text:span text:style-name="a343" text:class-names="">Phase 1 — MVP Core</text:span><text:span text:style-name="a344" text:class-names=""/></text:p>
              </text:list-item>
            </text:list>
            <text:list text:style-name="a350">
              <text:list-item>
                <text:p text:style-name="a349" text:class-names="" text:cond-style-name=""><text:span text:style-name="a347" text:class-names="">Lecture :</text:span><text:span text:style-name="a348" text:class-names=""><text:s text:c="1"/>Markdown, paragraphes courts (1000 car. max), drag-and-drop.</text:span></text:p>
              </text:list-item>
            </text:list>
            <text:list text:style-name="a354">
              <text:list-item>
                <text:p text:style-name="a353" text:class-names="" text:cond-style-name=""><text:span text:style-name="a351" text:class-names="">Interface :</text:span><text:span text:style-name="a352" text:class-names=""><text:s text:c="1"/>Mode "Normal" / "Connaissance", navigation clavier.</text:span></text:p>
              </text:list-item>
            </text:list>
            <text:list text:style-name="a358">
              <text:list-item>
                <text:p text:style-name="a357" text:class-names="" text:cond-style-name=""><text:span text:style-name="a355" text:class-names="">Compte :</text:span><text:span text:style-name="a356" text:class-names=""><text:s text:c="1"/>Mode invité (sans synchro), favoris, historique, export.</text:span></text:p>
              </text:list-item>
            </text:list>
            <text:list text:style-name="a362">
              <text:list-item>
                <text:p text:style-name="a361" text:class-names="" text:cond-style-name=""><text:span text:style-name="a359" text:class-names="">Sécurité :</text:span><text:span text:style-name="a360" text:class-names=""><text:s text:c="1"/>Suppression de compte simplifiée.</text:span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>Système de versionnage des articles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>Citation/source obligatoire choisi par les modérateur</text:span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<text:s text:c="1"/>licence mit<text:s text:c="1"/>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/></text:p>
              </text:list-item>
            </text:list>
          </draw:text-box>
          <svg:title/>
          <svg:desc/>
        </draw:frame>
        <draw:frame draw:id="id66" draw:style-name="a376" draw:name="Picture 6" svg:x="0in" svg:y="3.97in" svg:width="4.9375in" svg:height="3.5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77" draw:master-page-name="Master1-Layout2-obj-Titre-et-contenu" presentation:presentation-page-layout-name="Master1-PPL2" draw:id="Slide-258">
        <draw:frame draw:id="id67" presentation:style-name="a391" draw:name="Espace réservé du contenu 2" svg:x="0in" svg:y="0in" svg:width="13.33333in" svg:height="7.5in" presentation:class="outline" presentation:placeholder="false">
          <draw:text-box>
            <text:list text:style-name="a381">
              <text:list-item>
                <text:p text:style-name="a380" text:class-names="" text:cond-style-name=""><text:span text:style-name="a378" text:class-names="">Phase 2 — Accessibilité</text:span><text:span text:style-name="a379" text:class-names=""/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Thèmes : E-ink, daltonisme, couleurs personnalisées.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Profils : TSA, Dys, TDA/H, Malvoyant, Normal.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Lecteur d'écran + polices personnalisées.</text:span></text:p>
              </text:list-item>
            </text:list>
          </draw:text-box>
          <svg:title/>
          <svg:desc/>
        </draw:frame>
      </draw:page>
      <draw:page draw:name="Slide4" draw:style-name="a392" draw:master-page-name="Master1-Layout2-obj-Titre-et-contenu" presentation:presentation-page-layout-name="Master1-PPL2" draw:id="Slide-259">
        <draw:frame draw:id="id68" presentation:style-name="a415" draw:name="Espace réservé du contenu 2" svg:x="0in" svg:y="0in" svg:width="13.33333in" svg:height="7.5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3" text:class-names="">Phase 3 — Contenu enrichi</text:span><text:span text:style-name="a394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Interactions : Survol = définition, sélection code = explication.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Annotations : Notes privées, surlignage sauvegardé.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Résumés : Par l'auteur ou par IA.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Chemins d'apprentissage<text:s text:c="1"/>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Smart Links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Snippets</text:span></text:p>
              </text:list-item>
            </text:list>
          </draw:text-box>
          <svg:title/>
          <svg:desc/>
        </draw:frame>
      </draw:page>
      <draw:page draw:name="Slide5" draw:style-name="a416" draw:master-page-name="Master1-Layout2-obj-Titre-et-contenu" presentation:presentation-page-layout-name="Master1-PPL2" draw:id="Slide-260">
        <draw:frame draw:id="id69" presentation:style-name="a427" draw:name="Espace réservé du contenu 2" svg:x="0in" svg:y="0in" svg:width="13.33333in" svg:height="7.5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7" text:class-names="">Phase 4 — Audio &amp; Vidéo</text:span><text:span text:style-name="a418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Synthèse vocale multilingue (6 langues).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Sous-titres et commandes vocales personnalisables.</text:span></text:p>
              </text:list-item>
            </text:list>
          </draw:text-box>
          <svg:title/>
          <svg:desc/>
        </draw:frame>
      </draw:page>
      <draw:page draw:name="Slide6" draw:style-name="a428" draw:master-page-name="Master1-Layout2-obj-Titre-et-contenu" presentation:presentation-page-layout-name="Master1-PPL2" draw:id="Slide-261">
        <draw:frame draw:id="id70" presentation:style-name="a445" draw:name="Espace réservé du contenu 2" svg:x="0in" svg:y="0in" svg:width="13.33333in" svg:height="7.5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29" text:class-names="">Phase 5 — Recherche &amp; IA</text:span><text:span text:style-name="a430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Recherche sémantique par paragraphe.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Tags hiérarchiques (ex: Linux → Arch → Hyprland).</text:span></text:p>
              </text:list-item>
            </text:list>
            <text:list text:style-name="a444">
              <text:list-item>
                <text:p text:style-name="a443" text:class-names="" text:cond-style-name=""><text:span text:style-name="a439" text:class-names="">IA Hybride :</text:span><text:span text:style-name="a440" text:class-names=""><text:s text:c="1"/>Clé API personnelle OU IA locale (Ollama).<text:s text:c="1"/></text:span><text:span text:style-name="a441" text:class-names="">Avantage : fonctionne même hors-ligne !</text:span><text:span text:style-name="a442" text:class-names=""/></text:p>
              </text:list-item>
            </text:list>
          </draw:text-box>
          <svg:title/>
          <svg:desc/>
        </draw:frame>
      </draw:page>
      <draw:page draw:name="Slide7" draw:style-name="a446" draw:master-page-name="Master1-Layout2-obj-Titre-et-contenu" presentation:presentation-page-layout-name="Master1-PPL2" draw:id="Slide-262">
        <draw:frame draw:id="id71" presentation:style-name="a465" draw:name="Espace réservé du contenu 2" svg:x="0in" svg:y="0in" svg:width="13.33333in" svg:height="7.5in" presentation:class="outline" presentation:placeholder="false">
          <draw:text-box>
            <text:list text:style-name="a449">
              <text:list-item>
                <text:p text:style-name="a448" text:class-names="" text:cond-style-name=""><text:span text:style-name="a447" text:class-names="">Phase 6 — Communauté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Édition directe, connexion GitHub/GitLab, traduction collaborative par paragraphe.</text:span></text:p>
              </text:list-item>
            </text:list>
            <text:list text:style-name="a456">
              <text:list-item>
                <text:p text:style-name="a455" text:class-names="" text:cond-style-name=""><text:span text:style-name="a453" text:class-names="">Modération :</text:span><text:span text:style-name="a454" text:class-names=""><text:s text:c="1"/>Validation par la communauté (15 votes convergents) + validation par l'équipe technique pour les gros changements.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Pour les ajout vous devez être connecter<text:s text:c="1"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0" text:class-names="">Code de conduite</text:span><text:span text:style-name="a461" text:class-names=""><text:s text:c="1"/>et processus de signalement</text:span><text:span text:style-name="a462" text:class-names=""/></text:p>
              </text:list-item>
            </text:list>
          </draw:text-box>
          <svg:title/>
          <svg:desc/>
        </draw:frame>
      </draw:page>
      <draw:page draw:name="Slide8" draw:style-name="a466" draw:master-page-name="Master1-Layout2-obj-Titre-et-contenu" presentation:presentation-page-layout-name="Master1-PPL2" draw:id="Slide-263">
        <draw:frame draw:id="id72" presentation:style-name="a480" draw:name="Espace réservé du contenu 2" svg:x="0in" svg:y="0in" svg:width="13.33333in" svg:height="7.5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7" text:class-names="">Phase 7 — Dashboard &amp; Gamification</text:span><text:span text:style-name="a468" text:class-names=""/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Dashboard : Drag-and-drop, favoris, recommandations.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Stats : Temps de lecture, classements.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Gamification : Badges, défis, streaks.</text:span></text:p>
              </text:list-item>
            </text:list>
          </draw:text-box>
          <svg:title/>
          <svg:desc/>
        </draw:frame>
      </draw:page>
      <draw:page draw:name="Slide9" draw:style-name="a481" draw:master-page-name="Master1-Layout2-obj-Titre-et-contenu" presentation:presentation-page-layout-name="Master1-PPL2" draw:id="Slide-264">
        <draw:frame draw:id="id73" presentation:style-name="a492" draw:name="Espace réservé du contenu 2" svg:x="0in" svg:y="0in" svg:width="13.33333in" svg:height="7.5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2" text:class-names="">Phase 8 — Bien-être</text:span><text:span text:style-name="a483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Pomodoro intégré, alertes anti-surcharge.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Suggestions de pauses (étirements, hydratation).</text:span></text:p>
              </text:list-item>
            </text:list>
          </draw:text-box>
          <svg:title/>
          <svg:desc/>
        </draw:frame>
      </draw:page>
      <draw:page draw:name="Slide10" draw:style-name="a493" draw:master-page-name="Master1-Layout2-obj-Titre-et-contenu" presentation:presentation-page-layout-name="Master1-PPL2" draw:id="Slide-265">
        <draw:frame draw:id="id74" presentation:style-name="a501" draw:name="Espace réservé du contenu 2" svg:x="0in" svg:y="0in" svg:width="13.33333in" svg:height="7.5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4" text:class-names="">Phase 9 — Notifications</text:span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Web et Système, centre filtrable, alertes de MAJ.</text:span></text:p>
              </text:list-item>
            </text:list>
          </draw:text-box>
          <svg:title/>
          <svg:desc/>
        </draw:frame>
      </draw:page>
      <draw:page draw:name="Slide11" draw:style-name="a502" draw:master-page-name="Master1-Layout2-obj-Titre-et-contenu" presentation:presentation-page-layout-name="Master1-PPL2" draw:id="Slide-266">
        <draw:frame draw:id="id75" presentation:style-name="a515" draw:name="Espace réservé du contenu 2" svg:x="0in" svg:y="0in" svg:width="13.33333in" svg:height="7.5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Phase 10 — Apps Natives (Tauri)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Tous supports (Android, iOS, Linux, Windows, macOS).</text:span></text:p>
              </text:list-item>
            </text:list>
            <text:list text:style-name="a514">
              <text:list-item>
                <text:p text:style-name="a513" text:class-names="" text:cond-style-name=""><text:span text:style-name="a509" text:class-names="">Mode hors-ligne intelligent :</text:span><text:span text:style-name="a510" text:class-names=""><text:s text:c="1"/>Packs téléchargeables.<text:s text:c="1"/></text:span><text:span text:style-name="a511" text:class-names="">Sécurité : si tu supprimes par erreur, tu as 10 minutes avant que ça s'efface de la base de données.</text:span><text:span text:style-name="a512" text:class-names=""/></text:p>
              </text:list-item>
            </text:list>
          </draw:text-box>
          <svg:title/>
          <svg:desc/>
        </draw:frame>
      </draw:page>
      <draw:page draw:name="Slide12" draw:style-name="a516" draw:master-page-name="Master1-Layout2-obj-Titre-et-contenu" presentation:presentation-page-layout-name="Master1-PPL2" draw:id="Slide-267">
        <draw:frame draw:id="id76" presentation:style-name="a528" draw:name="Espace réservé du contenu 2" svg:x="0in" svg:y="0in" svg:width="13.33333in" svg:height="7.5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Phase 11 — Synchronisation</text:span></text:p>
              </text:list-item>
            </text:list>
            <text:list text:style-name="a524">
              <text:list-item>
                <text:p text:style-name="a523" text:class-names="" text:cond-style-name=""><text:span text:style-name="a520" text:class-names="">Chiffrement de bout en bout (E2EE) pour les favoris et notes<text:s text:c="1"/></text:span><text:span text:style-name="a521" text:class-names="">(réservé aux comptes enregistrés)</text:span><text:span text:style-name="a522" text:class-names="">.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Continuité de lecture multi-appareils.</text:span></text:p>
              </text:list-item>
            </text:list>
          </draw:text-box>
          <svg:title/>
          <svg:desc/>
        </draw:frame>
        <draw:frame draw:id="id77" draw:style-name="a529" draw:name="Picture 2" svg:x="4.66146in" svg:y="3.25in" svg:width="4.01042in" svg:height="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3" draw:style-name="a530" draw:master-page-name="Master1-Layout2-obj-Titre-et-contenu" presentation:presentation-page-layout-name="Master1-PPL2" draw:id="Slide-268">
        <draw:frame draw:id="id78" presentation:style-name="a538" draw:name="Espace réservé du contenu 2" svg:x="0in" svg:y="0in" svg:width="13.33333in" svg:height="7.5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1" text:class-names="">Phase 12 — Stabilisation</text:span><text:span text:style-name="a532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MAJ auto, notes de version, documentation utilisateur et contributeur.</text:span></text:p>
              </text:list-item>
            </text:list>
          </draw:text-box>
          <svg:title/>
          <svg:desc/>
        </draw:frame>
      </draw:page>
      <draw:page draw:name="Slide14" draw:style-name="a539" draw:master-page-name="Master1-Layout2-obj-Titre-et-contenu" presentation:presentation-page-layout-name="Master1-PPL2" draw:id="Slide-269">
        <draw:frame draw:id="id79" presentation:style-name="a552" draw:name="Espace réservé du contenu 2" svg:x="0in" svg:y="0in" svg:width="13.33333in" svg:height="7.5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Modèle Économique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Open source et gratuit par défaut.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Système de don/participation : la communauté peut financer pour accélérer la rédaction d'un article spécifique.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Version pro pour entreprises (self-host)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/06/2026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4/06/2026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/06/2026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4/06/2026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4/06/2026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/06/2026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/06/2026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4/06/2026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4/06/2026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/06/2026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4/06/2026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4/06/2026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orentin ROSSI</meta:initial-creator>
    <dc:creator>Corentin ROSSI</dc:creator>
    <meta:creation-date>2026-06-01T12:33:28Z</meta:creation-date>
    <dc:date>2026-06-04T15:00:28Z</dc:date>
    <meta:editing-cycles>7</meta:editing-cycles>
    <meta:editing-duration>PT10285S</meta:editing-duration>
    <meta:document-statistic meta:paragraph-count="54" meta:word-count="459"/>
  </office:meta>
</office:document-meta>
</file>