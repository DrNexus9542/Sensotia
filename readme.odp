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Sensotia le nouveau wikipedia</text:span></text:p>
          </draw:text-box>
          <svg:title/>
          <svg:desc/>
        </draw:frame>
        <draw:frame draw:id="id64" presentation:style-name="a341" draw:name="Sous-titr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Pensez pour l'informatique, les personnes handicapés et la recherche rapide<text:s text:c="1"/></text:span></text:p>
          </draw:text-box>
          <svg:title/>
          <svg:desc/>
        </draw:frame>
      </draw:page>
      <draw:page draw:name="Slide2" draw:style-name="a342" draw:master-page-name="Master1-Layout2-obj-Titre-et-contenu" presentation:presentation-page-layout-name="Master1-PPL2" draw:id="Slide-257">
        <draw:frame draw:id="id65" presentation:style-name="a352" draw:name="Espace réservé du contenu 2" svg:x="0.66in" svg:y="0.64in" svg:width="11.75667in" svg:height="6.11521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>La page 3 a 4 sert a présenter les personnes de l’équipe<text:s text:c="1"/></text:span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La page 4 a 14 sert a présenter les fonctionnalités<text:s text:c="1"/>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La page 15 sert a présenter les fonctionnalités de la V1/beta<text:s text:c="1"/></text:span></text:p>
              </text:list-item>
            </text:list>
          </draw:text-box>
          <svg:title/>
          <svg:desc/>
        </draw:frame>
      </draw:page>
      <draw:page draw:name="Slide3" draw:style-name="a353" draw:master-page-name="Master1-Layout2-obj-Titre-et-contenu" presentation:presentation-page-layout-name="Master1-PPL2" draw:id="Slide-258">
        <draw:frame draw:id="id66" presentation:style-name="a372" draw:name="Espace réservé du contenu 2" svg:x="0.83in" svg:y="0.83in" svg:width="11.58667in" svg:height="5.92521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>Voici la liste des interlocuteurs pour le projet sensotia (fait par A2ER7Y(moi), DrNexus(mon pote), et avec l’aide de l’équipe de xefi (dailyapps))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Premièrement merci a toute l’équipe xefi qui va répondre a mes questions et va m’aider a faire le plus de choses<text:s text:c="1"/>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Deuxièmement voici la liste de fonctionnalité a partir de la page 4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Troisièmement j’avais besoin d’un endroit ou je peux me perdre, lire plein de choses de l’informatique et étant moi-même TSA, TDA, DYS et hypersensible j’ai essayé de faire un endroit ou on peut trouver tout comme Amazon mais pour l'informatique et sans achat<text:s text:c="1"/>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</draw:page>
      <draw:page draw:name="Slide4" draw:style-name="a373" draw:master-page-name="Master1-Layout2-obj-Titre-et-contenu" presentation:presentation-page-layout-name="Master1-PPL2" draw:id="Slide-259">
        <draw:frame draw:id="id67" presentation:style-name="a435" draw:name="Espace réservé du contenu 2" svg:x="0.91667in" svg:y="0.75in" svg:width="11.5in" svg:height="6.00521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4" text:class-names="">Phase 1 — MVP Core</text:span><text:span text:style-name="a375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8" text:class-names="">Lecture</text:span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Support Markdown complet (car c’est comme discord)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Paragraphes courts et aérés (pas comme le Rust book)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1 paragraphe <text:s text:c="1"/>a la fois max 1000 caractère)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Texte déplaçable dans le navigateur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Interface</text:span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Mode minimaliste le minimum vital a l'interface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Modes Normal / connaissance pour les sujets et ducoup un bouton avec les prérequis<text:s text:c="1"/>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Boutons précédent / suivant (style Rust Book)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Navigation clavier (flèches)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Barre de recherche basique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Compte utilisateur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Inscription / connexion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Mode invité sans compte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Favori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Historique de lecture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Suppression de compte en 2 clics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Export</text:span></text:p>
              </text:list-item>
            </text:list>
          </draw:text-box>
          <svg:title/>
          <svg:desc/>
        </draw:frame>
      </draw:page>
      <draw:page draw:name="Slide5" draw:style-name="a436" draw:master-page-name="Master1-Layout2-obj-Titre-et-contenu" presentation:presentation-page-layout-name="Master1-PPL2" draw:id="Slide-260">
        <draw:frame draw:id="id68" presentation:style-name="a506" draw:name="Espace réservé du contenu 2" svg:x="0.91667in" svg:y="0.49in" svg:width="11.5in" svg:height="6.26521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7" text:class-names="">Phase 2 — Accessibilité &amp; Personnalisation</text:span><text:span text:style-name="a438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Thèmes</text:span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Thèmes prédéfini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Personnalisation complète des couleurs</text:span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Mode e-</text:span><text:span text:style-name="a452" text:class-names="">ink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3 modes daltoniens rouge vert et je ne sais pas moi</text:span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Profils d'accessibilité</text:span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rofil TSA (symétrie, prévisibilité, fluidité)</text:span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Profil Dys (</text:span><text:span text:style-name="a467" text:class-names="">OpenDyslexic</text:span><text:span text:style-name="a468" text:class-names="">, espacement, sans distraction)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rofil TDAH (mode minimaliste)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rofil Malvoyant (contrastes renforcés) très gro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7" text:class-names="">Option pour activer la liseuse d'écran<text:s text:c="1"/></text:span><text:span text:style-name="a478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81" text:class-names="">Ajout la<text:s text:c="1"/></text:span><text:span text:style-name="a482" text:class-names="">possibiliter</text:span><text:span text:style-name="a483" text:class-names=""><text:s text:c="1"/>de choisir une police pour<text:s text:c="1"/></text:span><text:span text:style-name="a484" text:class-names="">les exemple</text:span><text:span text:style-name="a485" text:class-names=""><text:s text:c="1"/></text:span><text:span text:style-name="a486" text:class-names="">de</text:span><text:span text:style-name="a487" text:class-names=""><text:s text:c="1"/></text:span><text:span text:style-name="a488" text:class-names="">code</text:span><text:span text:style-name="a489" text:class-names=""><text:s text:c="1"/></text:span><text:span text:style-name="a490" text:class-names="">le</text:span><text:span text:style-name="a491" text:class-names=""><text:s text:c="1"/></text:span><text:span text:style-name="a492" text:class-names="">texte<text:s text:c="1"/></text:span><text:span text:style-name="a493" text:class-names="">etc</text:span><text:span text:style-name="a494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Configuration</text:span><text:span text:style-name="a498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1" text:class-names="">Export / import de<text:s text:c="1"/></text:span><text:span text:style-name="a502" text:class-names="">configuration</text:span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2-obj-Titre-et-contenu" presentation:presentation-page-layout-name="Master1-PPL2" draw:id="Slide-261">
        <draw:frame draw:id="id69" presentation:style-name="a548" draw:name="Espace réservé du contenu 2" svg:x="0.91667in" svg:y="0.63in" svg:width="11.5in" svg:height="6.12521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8" text:class-names="">Phase 3 — Contenu enrichi</text:span><text:span text:style-name="a50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Interactions avec le texte</text:span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Hover sur mot technique → définitio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Sélection de code → explication ciblée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Sélection complète → explication globale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Bloc de code interactif (a la fin)</text:span></text:p>
              </text:list-item>
            </text:list>
            <text:list text:style-name="a531">
              <text:list-item>
                <text:p text:style-name="a530" text:class-names="" text:cond-style-name=""><text:span text:style-name="a528" text:class-names="">Annotations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Annotations personnelles privées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urlignage persistant entre sessions</text:span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Résumés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Résumé auto par IA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Résumé rédigé par l'auteur</text:span></text:p>
              </text:list-item>
            </text:list>
          </draw:text-box>
          <svg:title/>
          <svg:desc/>
        </draw:frame>
      </draw:page>
      <draw:page draw:name="Slide7" draw:style-name="a549" draw:master-page-name="Master1-Layout2-obj-Titre-et-contenu" presentation:presentation-page-layout-name="Master1-PPL2" draw:id="Slide-262">
        <draw:frame draw:id="id70" presentation:style-name="a586" draw:name="Espace réservé du contenu 2" svg:x="0.91667in" svg:y="0.64in" svg:width="11.5in" svg:height="6.11521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0" text:class-names="">Phase 4 — Synthèse vocale &amp; Audio</text:span><text:span text:style-name="a551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Texte-to-Speech</text:span><text:span text:style-name="a555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TS dans 6 langues anglais français chinois italien espagnole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Voix par défaut différente par langue et optimiser pour (accent)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Voix personnalisable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Sous-titrage des vidéos intégrées normale YouTube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Marqueurs audio (reprise de lecture) bah YouTube</text:span></text:p>
              </text:list-item>
            </text:list>
            <text:list text:style-name="a576">
              <text:list-item>
                <text:p text:style-name="a575" text:class-names="" text:cond-style-name=""><text:span text:style-name="a573" text:class-names="">Commandes vocales</text:span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Raccourci clavier pour activer le micro pour les aveugles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Liste de commandes vocales consultable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Commandes vocales gérées via paramètres</text:span></text:p>
              </text:list-item>
            </text:list>
          </draw:text-box>
          <svg:title/>
          <svg:desc/>
        </draw:frame>
      </draw:page>
      <draw:page draw:name="Slide8" draw:style-name="a587" draw:master-page-name="Master1-Layout2-obj-Titre-et-contenu" presentation:presentation-page-layout-name="Master1-PPL2" draw:id="Slide-263">
        <draw:frame draw:id="id71" presentation:style-name="a618" draw:name="Espace réservé du contenu 2" svg:x="0.91667in" svg:y="0.69in" svg:width="11.5in" svg:height="6.06521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8" text:class-names="">Phase 5 — Recherche &amp; IA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Recherche</text:span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Recherche sémantique boostée IA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Recherche au niveau du paragraphe tjr en sémantique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Filtres sauvegardés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ags hiérarchiques (ex : Linux &gt; Arch &gt; Hyprland &gt; quickshell &gt; dotfile)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IA</text:span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PI IA utilisable par l'utilisateur (clé personnelle) pour utiliser mon kimi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Option IA locale ultra-légère (Ollama) phi-3 mini (d'après deepseek ia c'est le meilleur rapport légèreté/performance)</text:span></text:p>
              </text:list-item>
            </text:list>
          </draw:text-box>
          <svg:title/>
          <svg:desc/>
        </draw:frame>
      </draw:page>
      <draw:page draw:name="Slide9" draw:style-name="a619" draw:master-page-name="Master1-Layout2-obj-Titre-et-contenu" presentation:presentation-page-layout-name="Master1-PPL2" draw:id="Slide-264">
        <draw:frame draw:id="id72" presentation:style-name="a675" draw:name="Espace réservé du contenu 2" svg:x="0.91667in" svg:y="0.73in" svg:width="11.5in" svg:height="6.02521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0" text:class-names="">Phase 6 — Communauté &amp; Contribution</text:span><text:span text:style-name="a621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4" text:class-names="">Contributeurs</text:span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Liste des contributeurs en footer avec pp style discord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Niveaux de contribution max 99 et c’est moi et nexus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op 10 + gros contributeurs : édition directe et prévisualisation du rendu avant publication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Validation modo/dev obligatoire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Connexion GitHub / GitLab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ntributions postables sur le site ou GitHub via les pr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Détection vibe code (modo/dev + IA) interdit si besoin je sui sur que des personnes peut aider pour les blogs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Contenu collaboratif</text:span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Amélioration d'articles (remplacement ou fusion choix de minimum 15 personne)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Liens réseaux sociaux du créateur du blog et de sensotia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Traduction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Traduction paragraphe par paragraphe pour les 6 langue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Source au choix (IA ou dictionnaire) pour la traduction auto autre que les 6 langue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raduction collaborative communautaire possible pour ajouter d'autre langue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Indicateur de qualité de traduction fait par la communauté<text:s text:c="1"/></text:span></text:p>
              </text:list-item>
            </text:list>
          </draw:text-box>
          <svg:title/>
          <svg:desc/>
        </draw:frame>
      </draw:page>
      <draw:page draw:name="Slide10" draw:style-name="a676" draw:master-page-name="Master1-Layout2-obj-Titre-et-contenu" presentation:presentation-page-layout-name="Master1-PPL2" draw:id="Slide-265">
        <draw:frame draw:id="id73" presentation:style-name="a741" draw:name="Espace réservé du contenu 2" svg:x="0.91667in" svg:y="0.58in" svg:width="11.5in" svg:height="6.17521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7" text:class-names="">Phase 7 — Dashboard &amp; Gamification</text:span><text:span text:style-name="a678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Dashboard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Drag and drop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Favoris sur dashboard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Derniers thèmes de lectures + page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Dernier ajout du site avec les nouvelles fonctionnalités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op 5 des Blog du jour les plus lu je veux que ca soit linux le premier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Statistiques</text:span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Classements dans le top monde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Temps de lecture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Combien de favori</text:span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Gamification</text:span><text:span text:style-name="a714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Objectifs hebdomadaires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Badges (ex : 100 blogs lus, premier utilisateur etc)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Défis quotidiens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treaks (jours consécutifs)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Achèvements rares se qui est rarement regarder comme l’init ou des trucs comme ca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jout d’un réel arbre pour tout classer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Classement public des trucs les plus regarder (hebdo / mensuel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Partage de stats sur réseaux sociaux pour flex<text:s text:c="1"/></text:span></text:p>
              </text:list-item>
            </text:list>
          </draw:text-box>
          <svg:title/>
          <svg:desc/>
        </draw:frame>
      </draw:page>
      <draw:page draw:name="Slide11" draw:style-name="a742" draw:master-page-name="Master1-Layout2-obj-Titre-et-contenu" presentation:presentation-page-layout-name="Master1-PPL2" draw:id="Slide-266">
        <draw:frame draw:id="id74" presentation:style-name="a766" draw:name="Espace réservé du contenu 2" svg:x="0.91667in" svg:y="0.65in" svg:width="11.5in" svg:height="6.10521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3" text:class-names="">Phase 8 — Mode Focus &amp; Bien-être</text:span><text:span text:style-name="a744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Pomodoro</text:span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imer Pomodoro intégré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Démarrage auto si profil TSA/TDAH activé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Freeze + blur après dépassement ( 5 min)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ruc recommander quand y’ a la paus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étirements, respiration, hydratation, manger etc</text:span></text:p>
              </text:list-item>
            </text:list>
          </draw:text-box>
          <svg:title/>
          <svg:desc/>
        </draw:frame>
      </draw:page>
      <draw:page draw:name="Slide12" draw:style-name="a767" draw:master-page-name="Master1-Layout2-obj-Titre-et-contenu" presentation:presentation-page-layout-name="Master1-PPL2" draw:id="Slide-267">
        <draw:frame draw:id="id75" presentation:style-name="a798" draw:name="Espace réservé du contenu 2" svg:x="0.91667in" svg:y="0.68in" svg:width="11.5in" svg:height="6.07521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Phase 9 — Notifications</text:span><text:span text:style-name="a769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Types de notifications</text:span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otifications navigateur (web)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Notifications système natives (app)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Pop-up MAJ à 15 / 10 / 5 min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Gestion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Centre de notifications filtrable et pour reporter les notifications de x ou y truc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Fréquence configurable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Alertes changelog / releases des blogs suivis</text:span></text:p>
              </text:list-item>
            </text:list>
          </draw:text-box>
          <svg:title/>
          <svg:desc/>
        </draw:frame>
      </draw:page>
      <draw:page draw:name="Slide13" draw:style-name="a799" draw:master-page-name="Master1-Layout2-obj-Titre-et-contenu" presentation:presentation-page-layout-name="Master1-PPL2" draw:id="Slide-268">
        <draw:frame draw:id="id76" presentation:style-name="a836" draw:name="Espace réservé du contenu 2" svg:x="0.91667in" svg:y="0.53in" svg:width="11.5in" svg:height="6.22521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0" text:class-names="">Phase 10 — Applications natives (Tauri)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Plateformes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Android (.apk)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iOS (.ipa)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Linux (.AppImage)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Debian (.deb)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Windows (.exe)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MacOS (.dmg)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Hors-ligne</text:span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Mode hors-ligne complet que si ca a télécharger le mode complet sinon quand tu ouvre un truc ca le télécharge mais sa doit être avec connexion 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ur voyage (pack thématique télécharger avant départ) exemple linux ducoup tu télécharge aussi c'est enfant comme init etc<text:s text:c="1"/></text:span></text:p>
              </text:list-item>
            </text:list>
          </draw:text-box>
          <svg:title/>
          <svg:desc/>
        </draw:frame>
      </draw:page>
      <draw:page draw:name="Slide14" draw:style-name="a837" draw:master-page-name="Master1-Layout2-obj-Titre-et-contenu" presentation:presentation-page-layout-name="Master1-PPL2" draw:id="Slide-269">
        <draw:frame draw:id="id77" presentation:style-name="a870" draw:name="Espace réservé du contenu 2" svg:x="0.91667in" svg:y="0.5in" svg:width="11.5in" svg:height="6.25521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8" text:class-names="">Phase 11 — Synchronisation</text:span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Sync multi-appareils chiffrée end-to-end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Chiffrement serveur des notes / favori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Continuité de lecture entre appareil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line-break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Phase 12 — Polish &amp; Stabilisation</text:span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Notes de version lisibles intégrées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MAJ silencieuses auto à 2h du matin toutes les semaines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Documentation utilisateur complète les regle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Documentation contributeur règle pour les contributeurs<text:s text:c="1"/></text:span></text:p>
              </text:list-item>
            </text:list>
          </draw:text-box>
          <svg:title/>
          <svg:desc/>
        </draw:frame>
      </draw:page>
      <draw:page draw:name="Slide15" draw:style-name="a871" draw:master-page-name="Master1-Layout2-obj-Titre-et-contenu" presentation:presentation-page-layout-name="Master1-PPL2" draw:id="Slide-270">
        <draw:frame draw:id="id78" presentation:style-name="a874" draw:name="Titre 1" svg:x="0.91667in" svg:y="0.39931in" svg:width="11.5in" svg:height="1.44965in" presentation:class="title" presentation:placeholder="false">
          <draw:text-box>
            <text:p text:style-name="a873" text:class-names="" text:cond-style-name=""><text:span text:style-name="a872" text:class-names="">La v1 et les techniques utiliser</text:span></text:p>
          </draw:text-box>
          <svg:title/>
          <svg:desc/>
        </draw:frame>
        <draw:frame draw:id="id79" presentation:style-name="a911" draw:name="Espace réservé du contenu 2" svg:x="0.91667in" svg:y="1.99653in" svg:width="11.5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Utilisation et compatibilité Markdown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Paragraphes courts et aéré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Texte déplaçable dans le navigateur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Contraste agréable a lire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Boutons précédent / suivant (style Rust Book)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Navigation clavier (flèches)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Barre de recherche basiqu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Une ui/ux guchy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Un sélectionneur pour choisir tous les couleurs utiliser dans le site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Uniquement site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16" draw:style-name="a912" draw:master-page-name="Master1-Layout2-obj-Titre-et-contenu" presentation:presentation-page-layout-name="Master1-PPL2" draw:id="Slide-271">
        <draw:frame draw:id="id80" presentation:style-name="a915" draw:name="Titre 1" svg:x="0.91667in" svg:y="0.39931in" svg:width="11.5in" svg:height="1.44965in" presentation:class="title" presentation:placeholder="false">
          <draw:text-box>
            <text:p text:style-name="a914" text:class-names="" text:cond-style-name=""><text:span text:style-name="a913" text:class-names="">Les avantage de sensotia paraport a wikipedia</text:span></text:p>
          </draw:text-box>
          <svg:title/>
          <svg:desc/>
        </draw:frame>
        <draw:frame draw:id="id81" presentation:style-name="a931" draw:name="Espace réservé du contenu 2" svg:x="0.91667in" svg:y="1.99653in" svg:width="11.5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Le premier point c’est Fr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Le deuxième c’est pensé pour que tout le monde puisse l’utiliser même avec c’est mot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Le troisième c’est un projet jeune avec des technique pensez pour les pcs récents pas les veille pc de 80/90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Pensez pour la rapidité et la fluidité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Les deux seul point ou on est pareil c’est que c’est open source et que c’est un site de recherche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/06/2026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/06/2026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/06/2026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/06/2026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/06/2026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/06/2026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/06/2026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/06/2026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/06/2026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/06/2026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/06/2026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/06/2026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orentin ROSSI</meta:initial-creator>
    <dc:creator>Corentin ROSSI</dc:creator>
    <meta:creation-date>2026-06-01T12:33:28Z</meta:creation-date>
    <dc:date>2026-06-03T08:43:28Z</dc:date>
    <meta:editing-cycles>7</meta:editing-cycles>
    <meta:editing-duration>PT10326S</meta:editing-duration>
    <meta:document-statistic meta:paragraph-count="166" meta:word-count="1168"/>
  </office:meta>
</office:document-meta>
</file>