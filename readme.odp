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740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center" style:tab-stop-distance="1in" fo:margin-left="0.25in" fo:margin-right="0in" fo:text-indent="-0.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center" style:tab-stop-distance="1in" fo:margin-left="0.25in" fo:margin-right="0in" fo:text-indent="-0.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70%" fo:text-align="center" style:tab-stop-distance="1in" fo:margin-left="0.25in" fo:margin-right="0in" fo:text-indent="-0.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70%" fo:text-align="center" style:tab-stop-distance="1in" fo:margin-left="0.25in" fo:margin-right="0in" fo:text-indent="-0.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70%" fo:text-align="center" style:tab-stop-distance="1in" fo:margin-left="0.25in" fo:margin-right="0in" fo:text-indent="-0.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4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4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4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4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4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4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4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4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4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4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4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4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4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4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4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4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4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4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4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4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4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4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7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0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center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6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0">
      <style:paragraph-properties fo:line-height="90%" fo:text-align="center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8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frame draw:id="id63" presentation:style-name="a341" draw:name="Titre 1" svg:x="0in" svg:y="0in" svg:width="13.33333in" svg:height="7.5in" presentation:class="title" presentation:placeholder="false">
          <draw:text-box>
            <text:p text:style-name="a340" text:class-names="" text:cond-style-name=""><text:span text:style-name="a336" text:class-names="">Sensotia, la base de connaissances nouvelle génération pour l’informatique</text:span><text:span text:style-name="a337" text:class-names=""><text:line-break/></text:span><text:span text:style-name="a338" text:class-names="">Pensée pour l’accessibilité, la clarté et la recherche rapide</text:span><text:span text:style-name="a339" text:class-names=""/></text:p>
          </draw:text-box>
          <svg:title/>
          <svg:desc/>
        </draw:frame>
      </draw:page>
      <draw:page draw:name="Slide31" draw:style-name="a342" draw:master-page-name="Master1-Layout2-obj-Titre-et-contenu" presentation:presentation-page-layout-name="Master1-PPL2" draw:id="Slide-286">
        <draw:frame draw:id="id64" presentation:style-name="a346" draw:name="Titre 1" svg:x="0in" svg:y="0in" svg:width="13.33333in" svg:height="1.84896in" presentation:class="title" presentation:placeholder="false">
          <draw:text-box>
            <text:p text:style-name="a345" text:class-names="" text:cond-style-name=""><text:span text:style-name="a343" text:class-names="">Pourquoi Sensotia plutôt que Wikipédia pour l’informatique ?</text:span><text:span text:style-name="a344" text:class-names=""/></text:p>
          </draw:text-box>
          <svg:title/>
          <svg:desc/>
        </draw:frame>
        <draw:frame draw:id="id65" presentation:style-name="a372" draw:name="Espace réservé du contenu 2" svg:x="0in" svg:y="1.84896in" svg:width="13.33333in" svg:height="5.65104in" presentation:class="outline" presentation:placeholder="false">
          <draw:text-box>
            <text:list text:style-name="a349">
              <text:list-item>
                <text:p text:style-name="a348" text:class-names="" text:cond-style-name=""><text:span text:style-name="a347" text:class-names="">Une approche pensée d’abord pour le contenu technique</text:span></text:p>
              </text:list-item>
            </text:list>
            <text:list text:style-name="a352">
              <text:list-item>
                <text:p text:style-name="a351" text:class-names="" text:cond-style-name=""><text:span text:style-name="a350" text:class-names="">Une interface conçue pour la lisibilité, la rapidité et la fluidité</text:span></text:p>
              </text:list-item>
            </text:list>
            <text:list text:style-name="a355">
              <text:list-item>
                <text:p text:style-name="a354" text:class-names="" text:cond-style-name=""><text:span text:style-name="a353" text:class-names="">Une meilleure prise en compte de l’accessibilité et des besoins spécifiques</text:span></text:p>
              </text:list-item>
            </text:list>
            <text:list text:style-name="a358">
              <text:list-item>
                <text:p text:style-name="a357" text:class-names="" text:cond-style-name=""><text:span text:style-name="a356" text:class-names="">Une architecture moderne pensée pour les usages actuels</text:span></text:p>
              </text:list-item>
            </text:list>
            <text:list text:style-name="a361">
              <text:list-item>
                <text:p text:style-name="a360" text:class-names="" text:cond-style-name=""><text:span text:style-name="a359" text:class-names="">Un projet open source orienté recherche et apprentissage spécialisé</text:span></text:p>
              </text:list-item>
            </text:list>
            <text:list text:style-name="a365">
              <text:list-item>
                <text:p text:style-name="a364" text:class-names="" text:cond-style-name=""><text:span text:style-name="a362" text:class-names="">Points communs avec Wikipédia</text:span><text:span text:style-name="a363" text:class-names=""/></text:p>
              </text:list-item>
            </text:list>
            <text:list text:style-name="a368">
              <text:list-item>
                <text:p text:style-name="a367" text:class-names="" text:cond-style-name=""><text:span text:style-name="a366" text:class-names="">Open source</text:span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>Accès à la connaissance</text:span></text:p>
              </text:list-item>
            </text:list>
          </draw:text-box>
          <svg:title/>
          <svg:desc/>
        </draw:frame>
      </draw:page>
      <draw:page draw:name="Slide17" draw:style-name="a373" draw:master-page-name="Master1-Layout2-obj-Titre-et-contenu" presentation:presentation-page-layout-name="Master1-PPL2" draw:id="Slide-272">
        <draw:frame draw:id="id66" presentation:style-name="a377" draw:name="Titre 1" svg:x="0in" svg:y="0in" svg:width="13.33333in" svg:height="1.84896in" presentation:class="title" presentation:placeholder="false">
          <draw:text-box>
            <text:p text:style-name="a376" text:class-names="" text:cond-style-name=""><text:span text:style-name="a374" text:class-names="">Vision du projet</text:span><text:span text:style-name="a375" text:class-names=""/></text:p>
          </draw:text-box>
          <svg:title/>
          <svg:desc/>
        </draw:frame>
        <draw:frame draw:id="id67" presentation:style-name="a387" draw:name="Espace réservé du contenu 2" svg:x="0in" svg:y="1.84896in" svg:width="13.33333in" svg:height="5.65104in" presentation:class="outline" presentation:placeholder="false">
          <draw:text-box>
            <text:list text:style-name="a380">
              <text:list-item>
                <text:p text:style-name="a379" text:class-names="" text:cond-style-name=""><text:span text:style-name="a378" text:class-names="">Sensotia est un projet imaginé par A2ER7Y, DrNexus et soutenu par l’équipe Xefi / DailyApps.<text:s text:c="1"/>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L’objectif est de créer un espace où l’on peut apprendre, explorer et retrouver rapidement des contenus liés à l’informatique.</text:span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>Le projet est également pensé pour être plus accessible aux personnes ayant des besoins spécifiques, notamment en matière de lisibilité, de structure et de confort de navigation.</text:span></text:p>
              </text:list-item>
            </text:list>
          </draw:text-box>
          <svg:title/>
          <svg:desc/>
        </draw:frame>
      </draw:page>
      <draw:page draw:name="Slide30" draw:style-name="a388" draw:master-page-name="Master1-Layout2-obj-Titre-et-contenu" presentation:presentation-page-layout-name="Master1-PPL2" draw:id="Slide-285">
        <draw:frame draw:id="id68" presentation:style-name="a392" draw:name="Titre 1" svg:x="0in" svg:y="0in" svg:width="13.33333in" svg:height="1.84896in" presentation:class="title" presentation:placeholder="false">
          <draw:text-box>
            <text:p text:style-name="a391" text:class-names="" text:cond-style-name=""><text:span text:style-name="a389" text:class-names="">V1 / bêta : fonctionnalités prévues</text:span><text:span text:style-name="a390" text:class-names=""/></text:p>
          </draw:text-box>
          <svg:title/>
          <svg:desc/>
        </draw:frame>
        <draw:frame draw:id="id69" presentation:style-name="a423" draw:name="Espace réservé du contenu 2" svg:x="0in" svg:y="1.74in" svg:width="13.33333in" svg:height="5.76in" presentation:class="outline" presentation:placeholder="false">
          <draw:text-box>
            <text:list text:style-name="a395">
              <text:list-item>
                <text:p text:style-name="a394" text:class-names="" text:cond-style-name=""><text:span text:style-name="a393" text:class-names="">Support et compatibilité Markdown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Paragraphes courts et aérés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Texte déplaçable dans le navigateur via drag and drop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>Contraste agréable à la lecture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>Boutons précédent / suivant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Navigation clavier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>Recherche avancée avec FlexSearch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Interface UI/UX soignée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Sélecteur de couleurs global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Version web uniquement dans un premier temps<text:s text:c="1"/></text:span></text:p>
              </text:list-item>
            </text:list>
          </draw:text-box>
          <svg:title/>
          <svg:desc/>
        </draw:frame>
      </draw:page>
      <draw:page draw:name="Slide18" draw:style-name="a424" draw:master-page-name="Master1-Layout2-obj-Titre-et-contenu" presentation:presentation-page-layout-name="Master1-PPL2" draw:id="Slide-273">
        <draw:frame draw:id="id70" presentation:style-name="a428" draw:name="Titre 1" svg:x="0in" svg:y="0in" svg:width="13.33333in" svg:height="1.84896in" presentation:class="title" presentation:placeholder="false">
          <draw:text-box>
            <text:p text:style-name="a427" text:class-names="" text:cond-style-name=""><text:span text:style-name="a425" text:class-names="">Phase 1 — MVP Core</text:span><text:span text:style-name="a426" text:class-names=""/></text:p>
          </draw:text-box>
          <svg:title/>
          <svg:desc/>
        </draw:frame>
        <draw:frame draw:id="id71" presentation:style-name="a518" draw:name="Espace réservé du contenu 2" svg:x="0in" svg:y="1.84896in" svg:width="13.33333in" svg:height="5.65104in" presentation:class="outline" presentation:placeholder="false">
          <draw:text-box>
            <text:list text:style-name="a432">
              <text:list-item>
                <text:p text:style-name="a431" text:class-names="" text:cond-style-name=""><text:span text:style-name="a429" text:class-names="">Lecture</text:span><text:span text:style-name="a430" text:class-names=""/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>Support complet du Markdown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>Paragraphes courts et aérés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Limite de 1 000 caractères par paragraphe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>Texte déplaçable dans le navigateur via un drag and drop<text:s text:c="1"/></text:span></text:p>
              </text:list-item>
            </text:list>
            <text:list text:style-name="a448">
              <text:list-item>
                <text:p text:style-name="a447" text:class-names="" text:cond-style-name=""><text:span text:style-name="a445" text:class-names="">Interface</text:span><text:span text:style-name="a446" text:class-names=""/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Interface minimaliste et lisible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Modes “Normal” (tu ne connais pas) et “Connaissance” (si tu connais une alternative) avec prérequis affichés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Boutons précédent / suivant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Navigation clavier avec les flèches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Barre de recherche basique</text:span></text:p>
              </text:list-item>
            </text:list>
            <text:list text:style-name="a467">
              <text:list-item>
                <text:p text:style-name="a466" text:class-names="" text:cond-style-name=""><text:span text:style-name="a464" text:class-names="">Compte utilisateur</text:span><text:span text:style-name="a465" text:class-names=""/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Inscription et connexion</text:span></text:p>
              </text:list-item>
            </text:list>
            <text:list text:style-name="a479">
              <text:list-item>
                <text:p text:style-name="a478" text:class-names="" text:cond-style-name=""><text:span text:style-name="a471" text:class-names="">Mode invité vous pouvez tout faire<text:s text:c="1"/></text:span><text:span text:style-name="a472" text:class-names="">sauf que</text:span><text:span text:style-name="a473" text:class-names=""><text:s text:c="1"/></text:span><text:span text:style-name="a474" text:class-names="">il y a pas</text:span><text:span text:style-name="a475" text:class-names=""><text:s text:c="1"/>de<text:s text:c="1"/></text:span><text:span text:style-name="a476" text:class-names="">recommandations<text:s text:c="1"/></text:span><text:span text:style-name="a477" text:class-names="">etc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Favoris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Historique de lecture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Suppression du compte simplifiée</text:span></text:p>
              </text:list-item>
            </text:list>
            <text:list text:style-name="a492">
              <text:list-item>
                <text:p text:style-name="a491" text:class-names="" text:cond-style-name=""><text:span text:style-name="a489" text:class-names="">espace dédié avec pp les projet etc</text:span><text:span text:style-name="a490" text:class-names="">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3" text:class-names="">Export</text:span><text:span text:style-name="a494" text:class-names=""/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Export des contenus ou préférences utilisateur</text:span></text:p>
              </text:list-item>
            </text:list>
            <text:list text:style-name="a503">
              <text:list-item>
                <text:p text:style-name="a502" text:class-names="" text:cond-style-name=""><text:span text:style-name="a500" text:class-names="">Système de versionnage des articles</text:span><text:span text:style-name="a501" text:class-names=""/></text:p>
              </text:list-item>
            </text:list>
            <text:list text:style-name="a507">
              <text:list-item>
                <text:p text:style-name="a506" text:class-names="" text:cond-style-name=""><text:span text:style-name="a504" text:class-names="">Citation/source obligatoire choisi par les modérateurs</text:span><text:span text:style-name="a505" text:class-names=""/></text:p>
              </text:list-item>
            </text:list>
            <text:list text:style-name="a511">
              <text:list-item>
                <text:p text:style-name="a510" text:class-names="" text:cond-style-name=""><text:span text:style-name="a508" text:class-names="">Licence MIT</text:span><text:span text:style-name="a509" text:class-names=""/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19" draw:style-name="a519" draw:master-page-name="Master1-Layout2-obj-Titre-et-contenu" presentation:presentation-page-layout-name="Master1-PPL2" draw:id="Slide-274">
        <draw:frame draw:id="id72" presentation:style-name="a523" draw:name="Titre 1" svg:x="0in" svg:y="0in" svg:width="13.33333in" svg:height="1.84896in" presentation:class="title" presentation:placeholder="false">
          <draw:text-box>
            <text:p text:style-name="a522" text:class-names="" text:cond-style-name=""><text:span text:style-name="a520" text:class-names="">Phase 2 — Accessibilité et personnalisation</text:span><text:span text:style-name="a521" text:class-names=""/></text:p>
          </draw:text-box>
          <svg:title/>
          <svg:desc/>
        </draw:frame>
        <draw:frame draw:id="id73" presentation:style-name="a575" draw:name="Espace réservé du contenu 2" svg:x="0in" svg:y="1.84896in" svg:width="13.33333in" svg:height="5.65104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4" text:class-names="">Thèmes</text:span><text:span text:style-name="a525" text:class-names=""/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Thèmes prédéfinis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Personnalisation complète des couleurs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Mode e-ink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Modes adaptés à différents types de daltonisme</text:span></text:p>
              </text:list-item>
            </text:list>
            <text:list text:style-name="a543">
              <text:list-item>
                <text:p text:style-name="a542" text:class-names="" text:cond-style-name=""><text:span text:style-name="a540" text:class-names="">Profils d’accessibilité</text:span><text:span text:style-name="a541" text:class-names=""/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Profil TSA : symétrie, prévisibilité, fluidité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Profil Dys : police adaptée, espacement, interface sans distraction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Profil TDA/H : mode minimaliste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Profil malvoyant : contraste renforcé et très grande lisibilité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Profil normal : aucune particularité spécifique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Compatibilité avec la lecture d’écran</text:span></text:p>
              </text:list-item>
            </text:list>
            <text:list text:style-name="a565">
              <text:list-item>
                <text:p text:style-name="a564" text:class-names="" text:cond-style-name=""><text:span text:style-name="a562" text:class-names="">Personnalisation</text:span><text:span text:style-name="a563" text:class-names=""/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Choix de la police pour le texte, le code et certains éléments de lecture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Export et import de la configuration manuellement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20" draw:style-name="a576" draw:master-page-name="Master1-Layout2-obj-Titre-et-contenu" presentation:presentation-page-layout-name="Master1-PPL2" draw:id="Slide-275">
        <draw:frame draw:id="id74" presentation:style-name="a580" draw:name="Titre 1" svg:x="0in" svg:y="0in" svg:width="13.33333in" svg:height="1.84896in" presentation:class="title" presentation:placeholder="false">
          <draw:text-box>
            <text:p text:style-name="a579" text:class-names="" text:cond-style-name=""><text:span text:style-name="a577" text:class-names="">Phase 3 — Contenu enrichi</text:span><text:span text:style-name="a578" text:class-names=""/></text:p>
          </draw:text-box>
          <svg:title/>
          <svg:desc/>
        </draw:frame>
        <draw:frame draw:id="id75" presentation:style-name="a620" draw:name="Espace réservé du contenu 2" svg:x="0in" svg:y="1.84896in" svg:width="13.33333in" svg:height="5.65104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1" text:class-names="">Interactions avec le texte</text:span><text:span text:style-name="a582" text:class-names=""/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Survol d’un terme technique pour afficher sa définition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Sélection d’un extrait de code pour obtenir une explication ciblée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Sélection d’un passage complet pour obtenir une explication globale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Blocs de code interactifs</text:span></text:p>
              </text:list-item>
            </text:list>
            <text:list text:style-name="a600">
              <text:list-item>
                <text:p text:style-name="a599" text:class-names="" text:cond-style-name=""><text:span text:style-name="a597" text:class-names="">Annotations</text:span><text:span text:style-name="a598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Notes personnelles privées via log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Surlignage conservé entre les sessions via serveur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7" text:class-names="">Résumés</text:span><text:span text:style-name="a608" text:class-names=""/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Résumé automatique par IA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Résumé rédigé par l’auteur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21" draw:style-name="a621" draw:master-page-name="Master1-Layout2-obj-Titre-et-contenu" presentation:presentation-page-layout-name="Master1-PPL2" draw:id="Slide-276">
        <draw:frame draw:id="id76" presentation:style-name="a625" draw:name="Titre 1" svg:x="0in" svg:y="0in" svg:width="13.33333in" svg:height="1.84896in" presentation:class="title" presentation:placeholder="false">
          <draw:text-box>
            <text:p text:style-name="a624" text:class-names="" text:cond-style-name=""><text:span text:style-name="a622" text:class-names="">Phase 4 — Synthèse vocale et audio</text:span><text:span text:style-name="a623" text:class-names=""/></text:p>
          </draw:text-box>
          <svg:title/>
          <svg:desc/>
        </draw:frame>
        <draw:frame draw:id="id77" presentation:style-name="a665" draw:name="Espace réservé du contenu 2" svg:x="0in" svg:y="1.84896in" svg:width="13.33333in" svg:height="5.65104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6" text:class-names="">Lecture audio</text:span><text:span text:style-name="a627" text:class-names=""/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Synthèse vocale en 6 langues : français, anglais, chinois, italien, espagnol et autres langues prioritaires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Voix par défaut adaptées à chaque langue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Voix personnalisables</text:span></text:p>
              </text:list-item>
            </text:list>
            <text:list text:style-name="a642">
              <text:list-item>
                <text:p text:style-name="a641" text:class-names="" text:cond-style-name=""><text:span text:style-name="a639" text:class-names="">Vidéos</text:span><text:span text:style-name="a640" text:class-names=""/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Sous-titres pour les vidéos intégrées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Marqueurs de reprise de lecture</text:span></text:p>
              </text:list-item>
            </text:list>
            <text:list text:style-name="a652">
              <text:list-item>
                <text:p text:style-name="a651" text:class-names="" text:cond-style-name=""><text:span text:style-name="a649" text:class-names="">Commandes vocales</text:span><text:span text:style-name="a650" text:class-names=""/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Raccourci clavier pour activer le micro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Liste de commandes vocales consultable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Paramètres de personnalisation des commandes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22" draw:style-name="a666" draw:master-page-name="Master1-Layout2-obj-Titre-et-contenu" presentation:presentation-page-layout-name="Master1-PPL2" draw:id="Slide-277">
        <draw:frame draw:id="id78" presentation:style-name="a670" draw:name="Titre 1" svg:x="0in" svg:y="0in" svg:width="13.33333in" svg:height="1.84896in" presentation:class="title" presentation:placeholder="false">
          <draw:text-box>
            <text:p text:style-name="a669" text:class-names="" text:cond-style-name=""><text:span text:style-name="a667" text:class-names="">Phase 5 — Recherche et IA</text:span><text:span text:style-name="a668" text:class-names=""/></text:p>
          </draw:text-box>
          <svg:title/>
          <svg:desc/>
        </draw:frame>
        <draw:frame draw:id="id79" presentation:style-name="a697" draw:name="Espace réservé du contenu 2" svg:x="0in" svg:y="1.84896in" svg:width="13.33333in" svg:height="5.65104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1" text:class-names="">Recherche</text:span><text:span text:style-name="a672" text:class-names=""/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Recherche sémantique assistée par IA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Recherche au niveau du paragraphe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Filtres sauvegardés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Tags hiérarchiques<text:line-break/>Exemple : Linux → Arch → Hyprland → Quickshell → Dotfiles</text:span></text:p>
              </text:list-item>
            </text:list>
            <text:list text:style-name="a690">
              <text:list-item>
                <text:p text:style-name="a689" text:class-names="" text:cond-style-name=""><text:span text:style-name="a687" text:class-names="">IA</text:span><text:span text:style-name="a688" text:class-names=""/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Utilisation d’une clé API personnelle (optionnel)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Intégration possible d’une IA locale légère via Ollama Phi-3 Mini (base)</text:span></text:p>
              </text:list-item>
            </text:list>
          </draw:text-box>
          <svg:title/>
          <svg:desc/>
        </draw:frame>
      </draw:page>
      <draw:page draw:name="Slide23" draw:style-name="a698" draw:master-page-name="Master1-Layout2-obj-Titre-et-contenu" presentation:presentation-page-layout-name="Master1-PPL2" draw:id="Slide-278">
        <draw:frame draw:id="id80" presentation:style-name="a702" draw:name="Titre 1" svg:x="0.91667in" svg:y="0.39931in" svg:width="11.5in" svg:height="1.44965in" presentation:class="title" presentation:placeholder="false">
          <draw:text-box>
            <text:p text:style-name="a701" text:class-names="" text:cond-style-name=""><text:span text:style-name="a699" text:class-names="">Phase 6 — Communauté et contribution</text:span><text:span text:style-name="a700" text:class-names=""/></text:p>
          </draw:text-box>
          <svg:title/>
          <svg:desc/>
        </draw:frame>
        <draw:frame draw:id="id81" presentation:style-name="a763" draw:name="Espace réservé du contenu 2" svg:x="-0.01333in" svg:y="1.84896in" svg:width="13.33333in" svg:height="5.65104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3" text:class-names="">Contributeurs</text:span><text:span text:style-name="a704" text:class-names=""/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Liste des contributeurs dans le footer avec leur photo de profil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Système de niveaux de contribution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Mise en avant des principaux contributeurs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Édition directe avec prévisualisation avant publication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Validation par modération ou équipe technique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Connexion GitHub / GitLab</text:span></text:p>
              </text:list-item>
            </text:list>
            <text:list text:style-name="a728">
              <text:list-item>
                <text:p text:style-name="a727" text:class-names="" text:cond-style-name=""><text:span text:style-name="a725" text:class-names="">Contenu collaboratif</text:span><text:span text:style-name="a726" text:class-names=""/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Amélioration d’articles par fusion ou remplacement validé par la communauté après 15 demandes de modification convergentes + validation par l'équipe technique pour les gros changements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Liens vers les réseaux sociaux du créateur de contenu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Espace de contribution sur le site ou via pull requests</text:span></text:p>
              </text:list-item>
            </text:list>
            <text:list text:style-name="a741">
              <text:list-item>
                <text:p text:style-name="a740" text:class-names="" text:cond-style-name=""><text:span text:style-name="a738" text:class-names="">Traduction</text:span><text:span text:style-name="a739" text:class-names=""/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Traduction paragraphe par paragraphe pour plusieurs langues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Choix de la source de traduction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Traduction collaborative communautaire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Indicateur de qualité des traductions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Pour les ajouts, vous devez être connecté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Code de conduite et processus de signalement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24" draw:style-name="a764" draw:master-page-name="Master1-Layout2-obj-Titre-et-contenu" presentation:presentation-page-layout-name="Master1-PPL2" draw:id="Slide-279">
        <draw:frame draw:id="id82" presentation:style-name="a768" draw:name="Titre 1" svg:x="0in" svg:y="0in" svg:width="13.33333in" svg:height="1.84896in" presentation:class="title" presentation:placeholder="false">
          <draw:text-box>
            <text:p text:style-name="a767" text:class-names="" text:cond-style-name=""><text:span text:style-name="a765" text:class-names="">Phase 7 — Dashboard et gamification</text:span><text:span text:style-name="a766" text:class-names=""/></text:p>
          </draw:text-box>
          <svg:title/>
          <svg:desc/>
        </draw:frame>
        <draw:frame draw:id="id83" presentation:style-name="a823" draw:name="Espace réservé du contenu 2" svg:x="0in" svg:y="1.84896in" svg:width="13.33333in" svg:height="5.65104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69" text:class-names="">Dashboard</text:span><text:span text:style-name="a770" text:class-names=""/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Interface personnalisable en drag-and-drop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Accès rapide aux favoris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Reprise des derniers thèmes et dernières lectures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Mise en avant des nouveaux contenus et nouvelles fonctionnalités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Top des articles les plus lus</text:span></text:p>
              </text:list-item>
            </text:list>
            <text:list text:style-name="a791">
              <text:list-item>
                <text:p text:style-name="a790" text:class-names="" text:cond-style-name=""><text:span text:style-name="a788" text:class-names="">Statistiques</text:span><text:span text:style-name="a789" text:class-names=""/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Temps de lecture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Nombre de favoris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Classements publics ou personnels</text:span></text:p>
              </text:list-item>
            </text:list>
            <text:list text:style-name="a804">
              <text:list-item>
                <text:p text:style-name="a803" text:class-names="" text:cond-style-name=""><text:span text:style-name="a801" text:class-names="">Gamification</text:span><text:span text:style-name="a802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Objectifs hebdomadaires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Badges et récompenses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Défis quotidiens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Streaks de lecture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Mise en valeur de contenus rares ou peu consultés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Arborescence claire pour classer les contenus</text:span></text:p>
              </text:list-item>
            </text:list>
          </draw:text-box>
          <svg:title/>
          <svg:desc/>
        </draw:frame>
      </draw:page>
      <draw:page draw:name="Slide25" draw:style-name="a824" draw:master-page-name="Master1-Layout2-obj-Titre-et-contenu" presentation:presentation-page-layout-name="Master1-PPL2" draw:id="Slide-280">
        <draw:frame draw:id="id84" presentation:style-name="a828" draw:name="Titre 1" svg:x="0in" svg:y="0in" svg:width="13.33333in" svg:height="1.84896in" presentation:class="title" presentation:placeholder="false">
          <draw:text-box>
            <text:p text:style-name="a827" text:class-names="" text:cond-style-name=""><text:span text:style-name="a825" text:class-names="">Phase 8 — Focus et bien-être</text:span><text:span text:style-name="a826" text:class-names=""/></text:p>
          </draw:text-box>
          <svg:title/>
          <svg:desc/>
        </draw:frame>
        <draw:frame draw:id="id85" presentation:style-name="a868" draw:name="Espace réservé du contenu 2" svg:x="0in" svg:y="1.84896in" svg:width="13.33333in" svg:height="5.65104in" presentation:class="outline" presentation:placeholder="false">
          <draw:text-box>
            <text:list text:style-name="a832">
              <text:list-item>
                <text:p text:style-name="a831" text:class-names="" text:cond-style-name=""><text:span text:style-name="a829" text:class-names="">Pomodoro</text:span><text:span text:style-name="a830" text:class-names=""/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Timer Pomodoro intégré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Activation automatique selon le profil utilisateur</text:span></text:p>
              </text:list-item>
            </text:list>
            <text:list text:style-name="a842">
              <text:list-item>
                <text:p text:style-name="a841" text:class-names="" text:cond-style-name=""><text:span text:style-name="a839" text:class-names="">Prévention de la surcharge</text:span><text:span text:style-name="a840" text:class-names=""/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Pause recommandée après un temps de lecture prolongé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Rappel visuel si dépassement du temps conseillé</text:span></text:p>
              </text:list-item>
            </text:list>
            <text:list text:style-name="a852">
              <text:list-item>
                <text:p text:style-name="a851" text:class-names="" text:cond-style-name=""><text:span text:style-name="a849" text:class-names="">Suggestions de pause</text:span><text:span text:style-name="a850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Étirements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Respiration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Hydratation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Pause repas ou récupération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</draw:text-box>
          <svg:title/>
          <svg:desc/>
        </draw:frame>
      </draw:page>
      <draw:page draw:name="Slide26" draw:style-name="a869" draw:master-page-name="Master1-Layout2-obj-Titre-et-contenu" presentation:presentation-page-layout-name="Master1-PPL2" draw:id="Slide-281">
        <draw:frame draw:id="id86" presentation:style-name="a873" draw:name="Titre 1" svg:x="0in" svg:y="0in" svg:width="13.33333in" svg:height="1.84896in" presentation:class="title" presentation:placeholder="false">
          <draw:text-box>
            <text:p text:style-name="a872" text:class-names="" text:cond-style-name=""><text:span text:style-name="a870" text:class-names="">Phase 9 — Notifications</text:span><text:span text:style-name="a871" text:class-names=""/></text:p>
          </draw:text-box>
          <svg:title/>
          <svg:desc/>
        </draw:frame>
        <draw:frame draw:id="id87" presentation:style-name="a900" draw:name="Espace réservé du contenu 2" svg:x="0in" svg:y="1.84896in" svg:width="13.33333in" svg:height="5.65104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4" text:class-names="">Types de notifications</text:span><text:span text:style-name="a875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Notifications web dans le navigateur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Notifications système dans l’application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Alertes de mise à jour</text:span></text:p>
              </text:list-item>
            </text:list>
            <text:list text:style-name="a890">
              <text:list-item>
                <text:p text:style-name="a889" text:class-names="" text:cond-style-name=""><text:span text:style-name="a887" text:class-names="">Gestion</text:span><text:span text:style-name="a888" text:class-names=""/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Centre de notifications filtrable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Réglage de la fréquence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Suivi des changelogs et publications des contenus suivis</text:span></text:p>
              </text:list-item>
            </text:list>
          </draw:text-box>
          <svg:title/>
          <svg:desc/>
        </draw:frame>
      </draw:page>
      <draw:page draw:name="Slide27" draw:style-name="a901" draw:master-page-name="Master1-Layout2-obj-Titre-et-contenu" presentation:presentation-page-layout-name="Master1-PPL2" draw:id="Slide-282">
        <draw:frame draw:id="id88" presentation:style-name="a905" draw:name="Titre 1" svg:x="0in" svg:y="0in" svg:width="13.33333in" svg:height="1.84896in" presentation:class="title" presentation:placeholder="false">
          <draw:text-box>
            <text:p text:style-name="a904" text:class-names="" text:cond-style-name=""><text:span text:style-name="a902" text:class-names="">Phase 10 — Applications natives avec Tauri</text:span><text:span text:style-name="a903" text:class-names=""/></text:p>
          </draw:text-box>
          <svg:title/>
          <svg:desc/>
        </draw:frame>
        <draw:frame draw:id="id89" presentation:style-name="a945" draw:name="Espace réservé du contenu 2" svg:x="0in" svg:y="1.84896in" svg:width="13.33333in" svg:height="5.65104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6" text:class-names="">Plateformes</text:span><text:span text:style-name="a907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Android (.apk)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iOS (.ipa)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Linux (.AppImage)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Debian (.deb)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Windows (.exe)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macOS (.dmg)</text:span></text:p>
              </text:list-item>
            </text:list>
            <text:list text:style-name="a931">
              <text:list-item>
                <text:p text:style-name="a930" text:class-names="" text:cond-style-name=""><text:span text:style-name="a928" text:class-names="">Mode hors ligne</text:span><text:span text:style-name="a929" text:class-names=""/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Téléchargement local des contenus consultés</text:span></text:p>
              </text:list-item>
            </text:list>
            <text:list text:style-name="a938">
              <text:list-item>
                <text:p text:style-name="a937" text:class-names="" text:cond-style-name=""><text:span text:style-name="a935" text:class-names="">Sécurité : si tu supprimes par erreur, tu as 10 minutes avant que ça s'efface de la base de données</text:span><text:span text:style-name="a936" text:class-names=""/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Packs thématiques téléchargeables avant déplacement ou voyage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Consultation hors connexion une fois les contenus synchronisés</text:span></text:p>
              </text:list-item>
            </text:list>
          </draw:text-box>
          <svg:title/>
          <svg:desc/>
        </draw:frame>
      </draw:page>
      <draw:page draw:name="Slide28" draw:style-name="a946" draw:master-page-name="Master1-Layout2-obj-Titre-et-contenu" presentation:presentation-page-layout-name="Master1-PPL2" draw:id="Slide-283">
        <draw:frame draw:id="id90" presentation:style-name="a950" draw:name="Titre 1" svg:x="0in" svg:y="0in" svg:width="13.33333in" svg:height="1.84896in" presentation:class="title" presentation:placeholder="false">
          <draw:text-box>
            <text:p text:style-name="a949" text:class-names="" text:cond-style-name=""><text:span text:style-name="a947" text:class-names="">Phase 11 — Synchronisation</text:span><text:span text:style-name="a948" text:class-names=""/></text:p>
          </draw:text-box>
          <svg:title/>
          <svg:desc/>
        </draw:frame>
        <draw:frame draw:id="id91" presentation:style-name="a963" draw:name="Espace réservé du contenu 2" svg:x="0in" svg:y="1.84896in" svg:width="13.33333in" svg:height="5.65104in" presentation:class="outline" presentation:placeholder="false">
          <draw:text-box>
            <text:list text:style-name="a953">
              <text:list-item>
                <text:p text:style-name="a952" text:class-names="" text:cond-style-name=""><text:span text:style-name="a951" text:class-names="">Synchronisation multi-appareils chiffrée de bout en bout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Chiffrement des notes et des favoris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Continuité de lecture entre appareils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Réservé aux comptes enregistrés</text:span></text:p>
              </text:list-item>
            </text:list>
          </draw:text-box>
          <svg:title/>
          <svg:desc/>
        </draw:frame>
      </draw:page>
      <draw:page draw:name="Slide29" draw:style-name="a964" draw:master-page-name="Master1-Layout2-obj-Titre-et-contenu" presentation:presentation-page-layout-name="Master1-PPL2" draw:id="Slide-284">
        <draw:frame draw:id="id92" presentation:style-name="a968" draw:name="Titre 1" svg:x="0in" svg:y="0in" svg:width="13.33333in" svg:height="1.84896in" presentation:class="title" presentation:placeholder="false">
          <draw:text-box>
            <text:p text:style-name="a967" text:class-names="" text:cond-style-name=""><text:span text:style-name="a965" text:class-names="">Phase 12 — Finalisation et stabilisation</text:span><text:span text:style-name="a966" text:class-names=""/></text:p>
          </draw:text-box>
          <svg:title/>
          <svg:desc/>
        </draw:frame>
        <draw:frame draw:id="id93" presentation:style-name="a981" draw:name="Espace réservé du contenu 2" svg:x="0in" svg:y="1.84896in" svg:width="13.33333in" svg:height="5.65104in" presentation:class="outline" presentation:placeholder="false">
          <draw:text-box>
            <text:list text:style-name="a971">
              <text:list-item>
                <text:p text:style-name="a970" text:class-names="" text:cond-style-name=""><text:span text:style-name="a969" text:class-names="">Notes de version lisibles dans l’application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Mises à jour automatiques planifiées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Documentation utilisateur complète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Documentation contributeur et règles de contribution</text:span></text:p>
              </text:list-item>
            </text:list>
          </draw:text-box>
          <svg:title/>
          <svg:desc/>
        </draw:frame>
      </draw:page>
      <draw:page draw:name="Slide32" draw:style-name="a982" draw:master-page-name="Master1-Layout2-obj-Titre-et-contenu" presentation:presentation-page-layout-name="Master1-PPL2" draw:id="Slide-287">
        <draw:frame draw:id="id94" presentation:style-name="a985" draw:name="Titre 1" svg:x="0in" svg:y="0in" svg:width="13.33333in" svg:height="1.84896in" presentation:class="title" presentation:placeholder="false">
          <draw:text-box>
            <text:p text:style-name="a984" text:class-names="" text:cond-style-name=""><text:span text:style-name="a983" text:class-names="">Modèle Économique</text:span></text:p>
          </draw:text-box>
          <svg:title/>
          <svg:desc/>
        </draw:frame>
        <draw:frame draw:id="id95" presentation:style-name="a992" draw:name="Espace réservé du contenu 2" svg:x="0in" svg:y="1.84896in" svg:width="13.33333in" svg:height="5.72104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6" text:class-names="">Système de don/participation : la communauté peut financer pour accélérer la rédaction d'un article spécifique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Version pro pour entreprises (self-host)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4/06/2026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4/06/2026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4/06/2026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4/06/2026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4/06/2026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4/06/2026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4/06/2026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4/06/2026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4/06/2026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4/06/2026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4/06/2026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4/06/2026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orentin ROSSI</meta:initial-creator>
    <dc:creator>Corentin ROSSI</dc:creator>
    <meta:creation-date>2026-06-01T12:33:28Z</meta:creation-date>
    <dc:date>2026-06-04T15:00:31Z</dc:date>
    <meta:editing-cycles>11</meta:editing-cycles>
    <meta:editing-duration>PT23662S</meta:editing-duration>
    <meta:document-statistic meta:paragraph-count="182" meta:word-count="1057"/>
  </office:meta>
</office:document-meta>
</file>